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629" officeooo:paragraph-rsid="00128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kkelekghjwopqẃyfuidopá+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19:16:52.998427952</meta:creation-date>
    <dc:date>2026-05-20T19:17:04.763301999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24.2.7.2$Linux_X86_64 LibreOffice_project/420$Build-2</meta:generator>
  </office:meta>
</office:document-meta>
</file>